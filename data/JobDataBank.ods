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-energy.com/en_US/jobs/Jobs ">
            <text:p>https://jobs.siemens-energy.com/en_US/jobs/Job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NLR">
            <text:p>NLR</text:p>
          </table:table-cell>
          <table:table-cell office:value-type="string" office:string-value="https://werkenbijnlr.recruitee.com/vacatures ">
            <text:p>https://werkenbijnlr.recruitee.com/vacature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apGemini">
            <text:p>CapGemini</text:p>
          </table:table-cell>
          <table:table-cell office:value-type="string" office:string-value="https://www.capgemini.com/de-de/karriere/jobs/?page=1&amp;size=11&amp;country_code=de-de ">
            <text:p>https://www.capgemini.com/de-de/karriere/jobs/?page=1&amp;size=11&amp;country_code=de-de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KN">
            <text:p>GKN</text:p>
          </table:table-cell>
          <table:table-cell office:value-type="string" office:string-value="https://joinus.gknaerospace.com/">
            <text:p>https://joinus.gknaerospace.com/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James Fischer">
            <text:p>James Fischer</text:p>
          </table:table-cell>
          <table:table-cell office:value-type="string" office:string-value="https://vacancies.james-fisher.com/vacancies/vacancy-search-results.aspx ">
            <text:p>https://vacancies.james-fisher.com/vacancies/vacancy-search-results.aspx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HD">
            <text:p>GHD</text:p>
          </table:table-cell>
          <table:table-cell office:value-type="string" office:string-value="https://ejov.fa.ca2.oraclecloud.com/hcmUI/CandidateExperience/en/sites/CX?utm_source=work-at-ghd&amp;utm_medium=hero-button&amp;utm_campaign=Careers-Search-Apply ">
            <text:p>https://ejov.fa.ca2.oraclecloud.com/hcmUI/CandidateExperience/en/sites/CX?utm_source=work-at-ghd&amp;utm_medium=hero-button&amp;utm_campaign=Careers-Search-Apply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RedBull">
            <text:p>RedBull</text:p>
          </table:table-cell>
          <table:table-cell office:value-type="string" office:string-value="https://careers.redbullracing.com/en/sites/CX_2 ">
            <text:p>https://careers.redbullracing.com/en/sites/CX_2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cadillac">
            <text:p>cadillac</text:p>
          </table:table-cell>
          <table:table-cell office:value-type="string" office:string-value="https://opportunities.cadillacf1team.com/en/ ">
            <text:p>https://opportunities.cadillacf1team.com/en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llegis">
            <text:p>Allegis</text:p>
          </table:table-cell>
          <table:table-cell office:value-type="string" office:string-value="https://www.allegisglobalsolutions.com/en/about-us/jobs ">
            <text:p>https://www.allegisglobalsolutions.com/en/about-us/jobs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Stirling Dyn">
            <text:p>Stirling Dyn</text:p>
          </table:table-cell>
          <table:table-cell office:value-type="string" office:string-value="https://stirlingdynamics-jobs-expleo.icims.com/jobs/search?ss=1&amp;mobile=false&amp;width=1265&amp;height=500&amp;bga=true&amp;needsRedirect=false&amp;jan1offset=60&amp;jun1offset=120">
            <text:p>https://stirlingdynamics-jobs-expleo.icims.com/jobs/search?ss=1&amp;mobile=false&amp;width=1265&amp;height=500&amp;bga=true&amp;needsRedirect=false&amp;jan1offset=60&amp;jun1offset=120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Type One Energy">
            <text:p>Type One Energy</text:p>
          </table:table-cell>
          <table:table-cell office:value-type="string" office:string-value="https://typeoneenergy.com/careers/ ">
            <text:p>https://typeoneenergy.com/careers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PhysicsX">
            <text:p>PhysicsX</text:p>
          </table:table-cell>
          <table:table-cell office:value-type="string" office:string-value="https://job-boards.eu.greenhouse.io/physicsx">
            <text:p>https://job-boards.eu.greenhouse.io/physicsx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bda">
            <text:p>Mbda</text:p>
          </table:table-cell>
          <table:table-cell office:value-type="string" office:string-value=" https://www.mbda-careers.de/karriere/stellenangebote/ ">
            <text:p> https://www.mbda-careers.de/karriere/stellenangebote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cron">
            <text:p>Acron</text:p>
          </table:table-cell>
          <table:table-cell office:value-type="string" office:string-value="https://workforcenow.adp.com/mascsr/default/mdf/recruitment/recruitment.html?cid=d0f6f3fc-e22e-48cc-8d92-107e52c30ed5&amp;ccId=9200985831336_2&amp;lang=en_US ">
            <text:p>https://workforcenow.adp.com/mascsr/default/mdf/recruitment/recruitment.html?cid=d0f6f3fc-e22e-48cc-8d92-107e52c30ed5&amp;ccId=9200985831336_2&amp;lang=en_US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TechnicFMC">
            <text:p>TechnicFMC</text:p>
          </table:table-cell>
          <table:table-cell office:value-type="string" office:string-value="https://careers.technipfmc.com/search ">
            <text:p>https://careers.technipfmc.com/search </text:p>
          </table:table-cell>
        </table:table-row>
      </table:table>
      <table:table table:name="Sheet2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