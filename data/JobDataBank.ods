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">
            <text:p>https://jobs.siemens.com/en_US/externaljobs/SearchJobs/?42386=%5B812132%5D&amp;42386_format=17546&amp;42389=%5B39106405%2C144468627%2C102122%2C102134%2C102127%5D&amp;42389_format=17549&amp;42390=%5B102155%2C102156%2C102157%2C102158%5D&amp;42390_format=17550&amp;listFilterMode=1&amp;folderRecordsPerPage=9&amp;acz=1&amp;gad_source=1&amp;gad_campaignid=22145011592&amp;gbraid=0AAAAADEuPPMyJNgoWK6259Pvtj28zRinJ&amp;gclid=Cj0KCQjw_vnQBhCxARIsADcZyxJmEyEMgRhsNpWNBs2CTtWxpEEVypzsHBAepKJh_FJ6ZQbC6twdIlUaAodaEALw_wcB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Hasoning">
            <text:p>Hasoning</text:p>
          </table:table-cell>
          <table:table-cell office:value-type="string" office:string-value="https://www.haskoning.com/en/careers/vacancies">
            <text:p>https://www.haskoning.com/en/careers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ith">
            <text:p>Voith</text:p>
          </table:table-cell>
          <table:table-cell office:value-type="string" office:string-value="https://jobs.voith.com/">
            <text:p>https://jobs.voith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Grob Aircraft">
            <text:p>Grob Aircraft</text:p>
          </table:table-cell>
          <table:table-cell office:value-type="string" office:string-value="https://jobs.grob-aircraft.com/jobs">
            <text:p>https://jobs.grob-aircraft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rager">
            <text:p>Drager</text:p>
          </table:table-cell>
          <table:table-cell office:value-type="string" office:string-value="https://www.draeger.com/de_de/Career">
            <text:p>https://www.draeger.com/de_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ana lim">
            <text:p>Dana lim</text:p>
          </table:table-cell>
          <table:table-cell office:value-type="string" office:string-value="https://jobs.dana.com/go/View-All-Jobs/9152900/">
            <text:p>https://jobs.dana.com/go/View-All-Jobs/9152900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olkswagen">
            <text:p>volkswagen</text:p>
          </table:table-cell>
          <table:table-cell office:value-type="string" office:string-value="https://jobs.volkswagen-group.com/Volkswagen-Group-Services/search/?locale=de_DE">
            <text:p>https://jobs.volkswagen-group.com/Volkswagen-Group-Services/search/?locale=de_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pendorf">
            <text:p>Eppendorf</text:p>
          </table:table-cell>
          <table:table-cell office:value-type="string" office:string-value="https://www.eppendorf.com/de-en/company-careers/career/job-portal/">
            <text:p>https://www.eppendorf.com/de-en/company-careers/career/job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liebherr">
            <text:p>liebherr</text:p>
          </table:table-cell>
          <table:table-cell office:value-type="string" office:string-value="https://www.liebherr.com/en-int/careers/careers-5370600">
            <text:p>https://www.liebherr.com/en-int/careers/careers-537060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olaris">
            <text:p>Polaris</text:p>
          </table:table-cell>
          <table:table-cell office:value-type="string" office:string-value="https://www.polaris-raumflugzeuge.de/career">
            <text:p>https://www.polaris-raumflugzeuge.de/career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lten">
            <text:p>Alten</text:p>
          </table:table-cell>
          <table:table-cell office:value-type="string" office:string-value="https://www.alten-germany.de/en/jobs/">
            <text:p>https://www.alten-germany.de/en/job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ertical Aerospace">
            <text:p>Vertical Aerospace</text:p>
          </table:table-cell>
          <table:table-cell office:value-type="string" office:string-value="https://vertical-aerospace.com/careers/">
            <text:p>https://vertical-aerospace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I">
            <text:p>SII</text:p>
          </table:table-cell>
          <table:table-cell office:value-type="string" office:string-value="https://sii-group.de/en/career-portal/">
            <text:p>https://sii-group.de/en/career-porta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afran">
            <text:p>Safran</text:p>
          </table:table-cell>
          <table:table-cell office:value-type="string" office:string-value="https://www.safran-group.com/jobs">
            <text:p>https://www.safran-group.com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P Mannheim">
            <text:p>EP Mannheim</text:p>
          </table:table-cell>
          <table:table-cell office:value-type="string" office:string-value="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">
            <text:p>https://www.ep-group.de/karriere/job-finden?utm_source=google_ads&amp;utm_campaign=g_ads_standorte&amp;keyword=job%20entwicklungsingenieur&amp;device=c&amp;network=g&amp;gad_source=1&amp;gad_campaignid=18597763329&amp;gbraid=0AAAAAByXapJHhe_g7avfyQJ_KzJnr4oVB&amp;gclid=Cj0KCQjw_vnQBhCxARIsADcZyxJj4PGTcd6VKpnCz7YPniJ6PILQHxagQH7Dh2lvvBwGVHPtEjXOYhAaAhEy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erzen">
            <text:p>Aerzen</text:p>
          </table:table-cell>
          <table:table-cell office:value-type="string" office:string-value="https://www.aerzen.com/career/job-offers">
            <text:p>https://www.aerzen.com/career/job-off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vana GMbh">
            <text:p>Pavana GMbh</text:p>
          </table:table-cell>
          <table:table-cell office:value-type="string" office:string-value="https://karriere.pavana-wind.com/job-offers.html">
            <text:p>https://karriere.pavana-wind.com/job-offers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3DS">
            <text:p>3DS</text:p>
          </table:table-cell>
          <table:table-cell office:value-type="string" office:string-value="https://www.3ds.com/careers/jobs">
            <text:p>https://www.3ds.com/careers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verllence">
            <text:p>Everllence</text:p>
          </table:table-cell>
          <table:table-cell office:value-type="string" office:string-value="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">
            <text:p>https://www.everllence.com/de/karriere?utm_medium=sea&amp;utm_source=google&amp;utm_campaign=always_ao_eb_de_e_260105&amp;utm_term=eb&amp;utm_content=link&amp;utm_medium=sea&amp;utm_source=google&amp;utm_campaign=always_ao_eb_de_e_260105&amp;utm_term=eb&amp;utm_content=link&amp;gad_source=1&amp;gad_campaignid=23575478370&amp;gbraid=0AAAAA-dbNDvyj0rXYEA6gHg_jPyVZ1m5G&amp;gclid=Cj0KCQjw_vnQBhCxARIsADcZyxKg9x-lK25xKq8jUYaWZEP1hx4CJ2d7r3oQoeqTgz0wOksdoto1MKYaAoEHEALw_wc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reisel">
            <text:p>Kreisel</text:p>
          </table:table-cell>
          <table:table-cell office:value-type="string" office:string-value="https://www.kreisel.eu/en/career/">
            <text:p>https://www.kreisel.eu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udi">
            <text:p>Audi</text:p>
          </table:table-cell>
          <table:table-cell office:value-type="string" office:string-value="https://careers.audi.com/desktop.html#/SEARCH/SIMPLE/">
            <text:p>https://careers.audi.com/desktop.html#/SEARCH/SIMPL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emens">
            <text:p>Siemens</text:p>
          </table:table-cell>
          <table:table-cell office:value-type="string" office:string-value="https://jobs.siemens-energy.com/en_US/jobs/Jobs ">
            <text:p>https://jobs.siemens-energy.com/en_US/jobs/Job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MW">
            <text:p>BMW</text:p>
          </table:table-cell>
          <table:table-cell office:value-type="string" office:string-value="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">
            <text:p>https://www.bmwgroup.jobs/de/de.html?clc={MarketingID}&amp;tl=sea-gl-SEA_BND_JOBS-mix-miy-.-sech-JOBS-.-p-bmw%20jobs-.-.&amp;clc=sea-gl-SEA_BND_JOBS-mix-JOBS&amp;gad_source=1&amp;gad_campaignid=12363556035&amp;gbraid=0AAAAADvNgksg-ogVU_Q69SROSPbou_eOY&amp;gclid=Cj0KCQjw_vnQBhCxARIsADcZyxIsDof2l4kdzsIPJhG4BlRJMK-LyAP6wa1U5HMvzOAn4EcRItUBwKQaAnrmEALw_wcB#location=DE&amp;&amp;jobType=STANDARD&amp;&amp;jobType=GRADUATE_JOB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E sys">
            <text:p>BAE sys</text:p>
          </table:table-cell>
          <table:table-cell office:value-type="string" office:string-value="https://jobsearch.baesystems.com/">
            <text:p>https://jobsearch.baesystems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BASF">
            <text:p>BASF</text:p>
          </table:table-cell>
          <table:table-cell office:value-type="string" office:string-value="https://www.basf.com/global/en/careers">
            <text:p>https://www.basf.com/global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tecto">
            <text:p>Simtecto</text:p>
          </table:table-cell>
          <table:table-cell office:value-type="string" office:string-value="https://www.simtecto.de/jobs-karriere.html">
            <text:p>https://www.simtecto.de/jobs-karriere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GR">
            <text:p>TGR</text:p>
          </table:table-cell>
          <table:table-cell office:value-type="string" office:string-value="https://careers.tgr-europe.com/">
            <text:p>https://careers.tgr-europ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IAV">
            <text:p>IAV</text:p>
          </table:table-cell>
          <table:table-cell office:value-type="string" office:string-value="https://www.iav.com/career/">
            <text:p>https://www.iav.com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amboll">
            <text:p>Ramboll</text:p>
          </table:table-cell>
          <table:table-cell office:value-type="string" office:string-value="https://www.ramboll.com/de-de/karriere">
            <text:p>https://www.ramboll.com/de-de/karrier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gentur fur arbeit">
            <text:p>Agentur fur arbeit</text:p>
          </table:table-cell>
          <table:table-cell office:value-type="string" office:string-value="https://www.arbeitsagentur.de/jobsuche/suche?angebotsart=1&amp;was=cfd">
            <text:p>https://www.arbeitsagentur.de/jobsuche/suche?angebotsart=1&amp;was=cfd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P Services">
            <text:p>AIP Services</text:p>
          </table:table-cell>
          <table:table-cell office:value-type="string" office:string-value="https://www.aip-services.de/aip-karriere/">
            <text:p>https://www.aip-services.de/aip-karrier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range engineering">
            <text:p>Orange engineering</text:p>
          </table:table-cell>
          <table:table-cell office:value-type="string" office:string-value="https://orange.jobs/gb/en">
            <text:p>https://orange.jobs/gb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KRZ">
            <text:p>DKRZ</text:p>
          </table:table-cell>
          <table:table-cell office:value-type="string" office:string-value="https://www.dkrz.de/de/about/stellenangebote">
            <text:p>https://www.dkrz.de/de/about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ocket Factory">
            <text:p>Rocket Factory</text:p>
          </table:table-cell>
          <table:table-cell office:value-type="string" office:string-value="https://job-boards.eu.greenhouse.io/rocketfactoryaugsburgag">
            <text:p>https://job-boards.eu.greenhouse.io/rocketfactoryaugsburgag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DLR">
            <text:p>DLR</text:p>
          </table:table-cell>
          <table:table-cell office:value-type="string" office:string-value="https://jobs.dlr.de/go/All-Jobs/9291501/?markerViewed=&amp;carouselIndex=&amp;facetFilters=%7B%22mfield1%22%3A%5B%22Graduates%22%5D%7D&amp;pageNumber=0">
            <text:p>https://jobs.dlr.de/go/All-Jobs/9291501/?markerViewed=&amp;carouselIndex=&amp;facetFilters=%7B%22mfield1%22%3A%5B%22Graduates%22%5D%7D&amp;pageNumber=0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TU">
            <text:p>MTU</text:p>
          </table:table-cell>
          <table:table-cell office:value-type="string" office:string-value="https://www.mtu.de/careers/online-job-market/s/all/all/all/all/">
            <text:p>https://www.mtu.de/careers/online-job-market/s/all/all/all/all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Kelvion">
            <text:p>Kelvion</text:p>
          </table:table-cell>
          <table:table-cell office:value-type="string" office:string-value="https://www.kelvion.com/de/karriere/jobs">
            <text:p>https://www.kelvion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OTTO fuchs">
            <text:p>OTTO fuchs</text:p>
          </table:table-cell>
          <table:table-cell office:value-type="string" office:string-value="https://www.otto-fuchs.com/de/karriere/jobs">
            <text:p>https://www.otto-fuchs.com/de/karrier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lasmatreat">
            <text:p>Plasmatreat</text:p>
          </table:table-cell>
          <table:table-cell office:value-type="string" office:string-value="https://jobs.plasmatreat.de/de">
            <text:p>https://jobs.plasmatreat.de/d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Ziehl">
            <text:p>Ziehl</text:p>
          </table:table-cell>
          <table:table-cell office:value-type="string" office:string-value="https://karriere.ziehl-abegg.de/jobs">
            <text:p>https://karriere.ziehl-abegg.de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einmetal">
            <text:p>Rheinmetal</text:p>
          </table:table-cell>
          <table:table-cell office:value-type="string" office:string-value="https://www.rheinmetall.com/en/career/vacancies">
            <text:p>https://www.rheinmetall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hyssenkurp">
            <text:p>Thyssenkurp</text:p>
          </table:table-cell>
          <table:table-cell office:value-type="string" office:string-value="https://karriere.thyssenkrupp.com/en">
            <text:p>https://karriere.thyssenkrupp.com/e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 power systems">
            <text:p>e power systems</text:p>
          </table:table-cell>
          <table:table-cell office:value-type="string" office:string-value="https://www.e-powerinternational.com/careers">
            <text:p>https://www.e-powerinternational.com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DAG">
            <text:p>EDAG</text:p>
          </table:table-cell>
          <table:table-cell office:value-type="string" office:string-value="https://www.edag.com/en/career/vacancies">
            <text:p>https://www.edag.com/en/career/vacancie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ÒKAPI">
            <text:p>ÒKAPI</text:p>
          </table:table-cell>
          <table:table-cell office:value-type="string" office:string-value="https://okapiorbits.jobs.personio.de/">
            <text:p>https://okapiorbits.jobs.personio.de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ENERCON">
            <text:p>ENERCON</text:p>
          </table:table-cell>
          <table:table-cell office:value-type="string" office:string-value="https://career.enercon.de/go/all-open-positions/9233655/">
            <text:p>https://career.enercon.de/go/all-open-positions/9233655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FX berlin">
            <text:p>CFX berlin</text:p>
          </table:table-cell>
          <table:table-cell office:value-type="string" office:string-value="https://www.cfx-berlin.de/cfx-berlin/stellenangebote">
            <text:p>https://www.cfx-berlin.de/cfx-berlin/stellenangebote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SA">
            <text:p>TESA</text:p>
          </table:table-cell>
          <table:table-cell office:value-type="string" office:string-value="https://www.tesa.com/en/about-tesa/career/current-vacancies?">
            <text:p>https://www.tesa.com/en/about-tesa/career/current-vacancies?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sing">
            <text:p>Helsing</text:p>
          </table:table-cell>
          <table:table-cell office:value-type="string" office:string-value="https://helsing.ai/jobs">
            <text:p>https://helsing.ai/job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ERSCHAU">
            <text:p>FERSCHAU</text:p>
          </table:table-cell>
          <table:table-cell office:value-type="string" office:string-value="https://touch.ferchau.com/de/de?type=3&amp;experienceLevel%5B0%5D=5&amp;sortingType=actuality&amp;sortingDirection=DESC">
            <text:p>https://touch.ferchau.com/de/de?type=3&amp;experienceLevel%5B0%5D=5&amp;sortingType=actuality&amp;sortingDirection=DESC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PACE aerospace">
            <text:p>PACE aerospace</text:p>
          </table:table-cell>
          <table:table-cell office:value-type="string" office:string-value="https://www.pace.de/pace-join-our-mission">
            <text:p>https://www.pace.de/pace-join-our-mission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irbus">
            <text:p>Airbus</text:p>
          </table:table-cell>
          <table:table-cell office:value-type="string" office:string-value="https://www.airbus.com/en/careers">
            <text:p>https://www.airbus.com/en/career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Fraunhofer">
            <text:p>Fraunhofer</text:p>
          </table:table-cell>
          <table:table-cell office:value-type="string" office:string-value="https://jobs.fraunhofer.de/search/?createNewAlert=false&amp;q=&amp;locationsearch=&amp;optionsFacetsDD_customfield1=&amp;optionsFacetsDD_customfield2=&amp;optionsFacetsDD_customfield3=&amp;optionsFacetsDD_customfield5=&amp;optionsFacetsDD_customfield4=&amp;optionsFacetsDD_lang=">
            <text:p>https://jobs.fraunhofer.de/search/?createNewAlert=false&amp;q=&amp;locationsearch=&amp;optionsFacetsDD_customfield1=&amp;optionsFacetsDD_customfield2=&amp;optionsFacetsDD_customfield3=&amp;optionsFacetsDD_customfield5=&amp;optionsFacetsDD_customfield4=&amp;optionsFacetsDD_lang=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Helmholtz">
            <text:p>Helmholtz</text:p>
          </table:table-cell>
          <table:table-cell office:value-type="string" office:string-value="https://www.helmholtz.de/en/career/job-vacancies/">
            <text:p>https://www.helmholtz.de/en/career/job-vacancies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NLR">
            <text:p>NLR</text:p>
          </table:table-cell>
          <table:table-cell office:value-type="string" office:string-value="https://werkenbijnlr.recruitee.com/vacatures ">
            <text:p>https://werkenbijnlr.recruitee.com/vacatures 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CapGemini">
            <text:p>CapGemini</text:p>
          </table:table-cell>
          <table:table-cell office:value-type="string" office:string-value="https://www.capgemini.com/de-de/karriere/jobs/?page=1&amp;size=11&amp;country_code=de-de ">
            <text:p>https://www.capgemini.com/de-de/karriere/jobs/?page=1&amp;size=11&amp;country_code=de-de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KN">
            <text:p>GKN</text:p>
          </table:table-cell>
          <table:table-cell office:value-type="string" office:string-value="https://joinus.gknaerospace.com/">
            <text:p>https://joinus.gknaerospace.com/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James Fischer">
            <text:p>James Fischer</text:p>
          </table:table-cell>
          <table:table-cell office:value-type="string" office:string-value="https://vacancies.james-fisher.com/vacancies/vacancy-search-results.aspx ">
            <text:p>https://vacancies.james-fisher.com/vacancies/vacancy-search-results.aspx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GHD">
            <text:p>GHD</text:p>
          </table:table-cell>
          <table:table-cell office:value-type="string" office:string-value="https://ejov.fa.ca2.oraclecloud.com/hcmUI/CandidateExperience/en/sites/CX?utm_source=work-at-ghd&amp;utm_medium=hero-button&amp;utm_campaign=Careers-Search-Apply ">
            <text:p>https://ejov.fa.ca2.oraclecloud.com/hcmUI/CandidateExperience/en/sites/CX?utm_source=work-at-ghd&amp;utm_medium=hero-button&amp;utm_campaign=Careers-Search-Apply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RedBull">
            <text:p>RedBull</text:p>
          </table:table-cell>
          <table:table-cell office:value-type="string" office:string-value="https://careers.redbullracing.com/en/sites/CX_2 ">
            <text:p>https://careers.redbullracing.com/en/sites/CX_2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cadillac">
            <text:p>cadillac</text:p>
          </table:table-cell>
          <table:table-cell office:value-type="string" office:string-value="https://opportunities.cadillacf1team.com/en/ ">
            <text:p>https://opportunities.cadillacf1team.com/en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llegis">
            <text:p>Allegis</text:p>
          </table:table-cell>
          <table:table-cell office:value-type="string" office:string-value="https://www.allegisglobalsolutions.com/en/about-us/jobs ">
            <text:p>https://www.allegisglobalsolutions.com/en/about-us/jobs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Stirling Dyn">
            <text:p>Stirling Dyn</text:p>
          </table:table-cell>
          <table:table-cell office:value-type="string" office:string-value="https://stirlingdynamics-jobs-expleo.icims.com/jobs/search?ss=1&amp;mobile=false&amp;width=1265&amp;height=500&amp;bga=true&amp;needsRedirect=false&amp;jan1offset=60&amp;jun1offset=120">
            <text:p>https://stirlingdynamics-jobs-expleo.icims.com/jobs/search?ss=1&amp;mobile=false&amp;width=1265&amp;height=500&amp;bga=true&amp;needsRedirect=false&amp;jan1offset=60&amp;jun1offset=120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Type One Energy">
            <text:p>Type One Energy</text:p>
          </table:table-cell>
          <table:table-cell office:value-type="string" office:string-value="https://typeoneenergy.com/careers/ ">
            <text:p>https://typeoneenergy.com/careers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PhysicsX">
            <text:p>PhysicsX</text:p>
          </table:table-cell>
          <table:table-cell office:value-type="string" office:string-value="https://job-boards.eu.greenhouse.io/physicsx">
            <text:p>https://job-boards.eu.greenhouse.io/physicsx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Mbda">
            <text:p>Mbda</text:p>
          </table:table-cell>
          <table:table-cell office:value-type="string" office:string-value=" https://www.mbda-careers.de/karriere/stellenangebote/ ">
            <text:p> https://www.mbda-careers.de/karriere/stellenangebote/ 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Job">
            <text:p>Job</text:p>
          </table:table-cell>
          <table:table-cell office:value-type="string" office:string-value="Acron">
            <text:p>Acron</text:p>
          </table:table-cell>
          <table:table-cell office:value-type="string" office:string-value="https://workforcenow.adp.com/mascsr/default/mdf/recruitment/recruitment.html?cid=d0f6f3fc-e22e-48cc-8d92-107e52c30ed5&amp;ccId=9200985831336_2&amp;lang=en_US ">
            <text:p>https://workforcenow.adp.com/mascsr/default/mdf/recruitment/recruitment.html?cid=d0f6f3fc-e22e-48cc-8d92-107e52c30ed5&amp;ccId=9200985831336_2&amp;lang=en_US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TechnicFMC">
            <text:p>TechnicFMC</text:p>
          </table:table-cell>
          <table:table-cell office:value-type="string" office:string-value="https://careers.technipfmc.com/search ">
            <text:p>https://careers.technipfmc.com/search 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string" office:string-value="Job">
            <text:p>Job</text:p>
          </table:table-cell>
          <table:table-cell office:value-type="string" office:string-value="Novo">
            <text:p>Novo</text:p>
          </table:table-cell>
          <table:table-cell office:value-type="string" office:string-value="https://careers.novonordisk.com/job/Lyngby-CFD-Engineering-Intern-Capi/1400359433/?feedId=300201&amp;utm_source=LinkedInJobPostings&amp;tcsource=Apply">
            <text:p>https://careers.novonordisk.com/job/Lyngby-CFD-Engineering-Intern-Capi/1400359433/?feedId=300201&amp;utm_source=LinkedInJobPostings&amp;tcsource=Apply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Viro">
            <text:p>Viro</text:p>
          </table:table-cell>
          <table:table-cell office:value-type="string" office:string-value="https://careers.viro-group.com/de/suche">
            <text:p>https://careers.viro-group.com/de/such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iTime">
            <text:p>SiTime</text:p>
          </table:table-cell>
          <table:table-cell office:value-type="string" office:string-value="https://www.sitime.com/job-listings">
            <text:p>https://www.sitime.com/job-list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MC">
            <text:p>TMC</text:p>
          </table:table-cell>
          <table:table-cell office:value-type="string" office:string-value="https://www.themembercompany.com/careers">
            <text:p>https://www.themembercompany.com/career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awn aero">
            <text:p>Dawn aero</text:p>
          </table:table-cell>
          <table:table-cell office:value-type="string" office:string-value="https://job-boards.anz.greenhouse.io/dawnaerospace">
            <text:p>https://job-boards.anz.greenhouse.io/dawnaerospace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TWD">
            <text:p>TWD</text:p>
          </table:table-cell>
          <table:table-cell office:value-type="string" office:string-value="https://careers.twd.nl/job-openings">
            <text:p>https://careers.twd.nl/job-opening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Sulzer">
            <text:p>Sulzer</text:p>
          </table:table-cell>
          <table:table-cell office:value-type="string" office:string-value="https://sulzer.wd502.myworkdayjobs.com/SulzerJobs?_gl=1*appxrx*_ga*MTA5ODExMTU3NS4xNzgwNTk5NjM2*_ga_8458H4ET1R*czE3ODA1OTk2MzQkbzEkZzAkdDE3ODA1OTk2NDEkajU2JGwwJGgw*_gcl_au*MTQ3OTk2MDc2LjE3ODA1OTk2Mzg.">
            <text:p>https://sulzer.wd502.myworkdayjobs.com/SulzerJobs?_gl=1*appxrx*_ga*MTA5ODExMTU3NS4xNzgwNTk5NjM2*_ga_8458H4ET1R*czE3ODA1OTk2MzQkbzEkZzAkdDE3ODA1OTk2NDEkajU2JGwwJGgw*_gcl_au*MTQ3OTk2MDc2LjE3ODA1OTk2Mzg.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pson">
            <text:p>Epson</text:p>
          </table:table-cell>
          <table:table-cell office:value-type="string" office:string-value="https://jobs.epson.eu/?ot_preferences=C0004%3A1%2CC0003%3A1%2CC0002%3A1%2CC0001%3A1&amp;adobe_mc=MCMID%3D14653130397806829223455958921558755594%7CMCORGID%3DC6DD45815AE6DFFD0A495D24%40AdobeOrg%7CTS%3D1780600471">
            <text:p>https://jobs.epson.eu/?ot_preferences=C0004%3A1%2CC0003%3A1%2CC0002%3A1%2CC0001%3A1&amp;adobe_mc=MCMID%3D14653130397806829223455958921558755594%7CMCORGID%3DC6DD45815AE6DFFD0A495D24%40AdobeOrg%7CTS%3D1780600471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Avnet">
            <text:p>Avnet</text:p>
          </table:table-cell>
          <table:table-cell office:value-type="string" office:string-value="https://wd1.myworkdaysite.com/recruiting/avnet/External">
            <text:p>https://wd1.myworkdaysite.com/recruiting/avnet/External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Enter BV">
            <text:p>Enter BV</text:p>
          </table:table-cell>
          <table:table-cell office:value-type="string" office:string-value="https://www.enter-group.nl/en/vacancies">
            <text:p>https://www.enter-group.nl/en/vacancies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BrinK">
            <text:p>BrinK</text:p>
          </table:table-cell>
          <table:table-cell office:value-type="string" office:string-value="https://brinks-careers.com/">
            <text:p>https://brinks-careers.com/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Gradyent">
            <text:p>Gradyent</text:p>
          </table:table-cell>
          <table:table-cell office:value-type="string" office:string-value="https://job-boards.eu.greenhouse.io/gradyent?gh_src=LinkedIn">
            <text:p>https://job-boards.eu.greenhouse.io/gradyent?gh_src=LinkedIn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Defenture">
            <text:p>Defenture</text:p>
          </table:table-cell>
          <table:table-cell office:value-type="string" office:string-value="https://werkenbijdefenture.nl/vacatures?#vacancy-overview">
            <text:p>https://werkenbijdefenture.nl/vacatures?#vacancy-overview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string" office:string-value="Job">
            <text:p>Job</text:p>
          </table:table-cell>
          <table:table-cell office:value-type="string" office:string-value="Jacobs">
            <text:p>Jacobs</text:p>
          </table:table-cell>
          <table:table-cell office:value-type="string" office:string-value="https://careers.jacobs.com/en_US/careers/Home">
            <text:p>https://careers.jacobs.com/en_US/careers/Home</text:p>
          </table:table-cell>
        </table:table-row>
        <table:table-row>
          <table:table-cell office:value-type="string" office:string-value="Sweden">
            <text:p>Sweden</text:p>
          </table:table-cell>
          <table:table-cell office:value-type="string" office:string-value="Job">
            <text:p>Job</text:p>
          </table:table-cell>
          <table:table-cell office:value-type="string" office:string-value="Merkle">
            <text:p>Merkle</text:p>
          </table:table-cell>
          <table:table-cell office:value-type="string" office:string-value="https://merkle-cae-solutions.talentstorm.de/stellenangebote">
            <text:p>https://merkle-cae-solutions.talentstorm.de/stellenangebote</text:p>
          </table:table-cell>
        </table:table-row>
        <table:table-row>
          <table:table-cell office:value-type="string" office:string-value="Sweden">
            <text:p>Sweden</text:p>
          </table:table-cell>
          <table:table-cell office:value-type="string" office:string-value="Job">
            <text:p>Job</text:p>
          </table:table-cell>
          <table:table-cell office:value-type="string" office:string-value="Enginsoft">
            <text:p>Enginsoft</text:p>
          </table:table-cell>
          <table:table-cell office:value-type="string" office:string-value="https://www.enginsoft.com/careers/">
            <text:p>https://www.enginsoft.com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uneer">
            <text:p>Simuneer</text:p>
          </table:table-cell>
          <table:table-cell office:value-type="string" office:string-value="https://simuneer.de/en/careers/">
            <text:p>https://simuneer.de/en/careers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mscale">
            <text:p>Simscale</text:p>
          </table:table-cell>
          <table:table-cell office:value-type="string" office:string-value="https://www.simscale.com/jobs/#openings">
            <text:p>https://www.simscale.com/jobs/#openings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conext">
            <text:p>Aconext</text:p>
          </table:table-cell>
          <table:table-cell office:value-type="string" office:string-value="https://aconext.de/en/career/">
            <text:p>https://aconext.de/en/career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rhode and schwarz">
            <text:p>rhode and schwarz</text:p>
          </table:table-cell>
          <table:table-cell office:value-type="string" office:string-value="https://www.rohde-schwarz.com/de/karriere/stellenangebote/karriere-stellenangebote_251573.html">
            <text:p>https://www.rohde-schwarz.com/de/karriere/stellenangebote/karriere-stellenangebote_251573.html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Arup">
            <text:p>Arup</text:p>
          </table:table-cell>
          <table:table-cell office:value-type="string" office:string-value="https://jobs.arup.com/jobs/search/19609985">
            <text:p>https://jobs.arup.com/jobs/search/19609985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E Global">
            <text:p>TE Global</text:p>
          </table:table-cell>
          <table:table-cell office:value-type="string" office:string-value="http://careers.te.com/">
            <text:p>http://careers.te.com/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Silver atena">
            <text:p>Silver atena</text:p>
          </table:table-cell>
          <table:table-cell office:value-type="string" office:string-value="https://karriere.silver-atena.de/stellenangebote">
            <text:p>https://karriere.silver-atena.de/stellenangebote</text:p>
          </table:table-cell>
        </table:table-row>
      </table:table>
      <table:table table:name="Sheet2">
        <table:table-row>
          <table:table-cell office:value-type="string" office:string-value="Country">
            <text:p>Country</text:p>
          </table:table-cell>
          <table:table-cell office:value-type="string" office:string-value="Type">
            <text:p>Type</text:p>
          </table:table-cell>
          <table:table-cell office:value-type="string" office:string-value="Company">
            <text:p>Company</text:p>
          </table:table-cell>
          <table:table-cell office:value-type="string" office:string-value="Career_URL">
            <text:p>Career_URL</text:p>
          </table:table-cell>
        </table:table-row>
        <table:table-row>
          <table:table-cell office:value-type="string" office:string-value="England">
            <text:p>Engla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University of Siegen">
            <text:p>University of Siegen</text:p>
          </table:table-cell>
          <table:table-cell office:value-type="string" office:string-value="https://jobs.uni-siegen.de/search/?createNewAlert=false&amp;q=&amp;optionsFacetsDD_customfield2=&amp;optionsFacetsDD_customfield1=&amp;optionsFacetsDD_customfield4=">
            <text:p>https://jobs.uni-siegen.de/search/?createNewAlert=false&amp;q=&amp;optionsFacetsDD_customfield2=&amp;optionsFacetsDD_customfield1=&amp;optionsFacetsDD_customfield4=</text:p>
          </table:table-cell>
        </table:table-row>
        <table:table-row>
          <table:table-cell office:value-type="string" office:string-value="Germany ">
            <text:p>Germany </text:p>
          </table:table-cell>
          <table:table-cell office:value-type="string" office:string-value="Job">
            <text:p>Job</text:p>
          </table:table-cell>
          <table:table-cell office:value-type="string" office:string-value="TU Dresden">
            <text:p>TU Dresden</text:p>
          </table:table-cell>
          <table:table-cell office:value-type="string" office:string-value="https://tu-dresden.de/tu-dresden/arbeiten-an-der-tud/stellenangebote/stellenangebote?lang=en&amp;style=cms2&amp;suche=1">
            <text:p>https://tu-dresden.de/tu-dresden/arbeiten-an-der-tud/stellenangebote/stellenangebote?lang=en&amp;style=cms2&amp;suche=1</text:p>
          </table:table-cell>
        </table:table-row>
        <table:table-row>
          <table:table-cell office:value-type="string" office:string-value="Germany">
            <text:p>Germany</text:p>
          </table:table-cell>
          <table:table-cell office:value-type="string" office:string-value="Job">
            <text:p>Job</text:p>
          </table:table-cell>
          <table:table-cell office:value-type="string" office:string-value="TU Braunschweig Portal">
            <text:p>TU Braunschweig Portal</text:p>
          </table:table-cell>
          <table:table-cell office:value-type="string" office:string-value="https://stellenticket.tu-braunschweig.de/stellenangebote">
            <text:p>https://stellenticket.tu-braunschweig.de/stellenangebo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