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S Dynamics">
            <text:p>FS Dynamic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FI">
            <text:p>IF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CS computing">
            <text:p>DCS computing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lycademy">
            <text:p>Flycademy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SAR aerospace">
            <text:p>ISAR aerospac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