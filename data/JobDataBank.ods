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Hasoning">
            <text:p>Hasoning</text:p>
          </table:table-cell>
          <table:table-cell office:value-type="string" office:string-value="https://www.haskoning.com/en/careers/vacancies">
            <text:p>https://www.haskoning.com/en/careers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-energy.com/en_US/jobs/Jobs ">
            <text:p>https://jobs.siemens-energy.com/en_US/jobs/Job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NLR">
            <text:p>NLR</text:p>
          </table:table-cell>
          <table:table-cell office:value-type="string" office:string-value="https://werkenbijnlr.recruitee.com/vacatures ">
            <text:p>https://werkenbijnlr.recruitee.com/vacature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apGemini">
            <text:p>CapGemini</text:p>
          </table:table-cell>
          <table:table-cell office:value-type="string" office:string-value="https://www.capgemini.com/de-de/karriere/jobs/?page=1&amp;size=11&amp;country_code=de-de ">
            <text:p>https://www.capgemini.com/de-de/karriere/jobs/?page=1&amp;size=11&amp;country_code=de-de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KN">
            <text:p>GKN</text:p>
          </table:table-cell>
          <table:table-cell office:value-type="string" office:string-value="https://joinus.gknaerospace.com/">
            <text:p>https://joinus.gknaerospace.com/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James Fischer">
            <text:p>James Fischer</text:p>
          </table:table-cell>
          <table:table-cell office:value-type="string" office:string-value="https://vacancies.james-fisher.com/vacancies/vacancy-search-results.aspx ">
            <text:p>https://vacancies.james-fisher.com/vacancies/vacancy-search-results.aspx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HD">
            <text:p>GHD</text:p>
          </table:table-cell>
          <table:table-cell office:value-type="string" office:string-value="https://ejov.fa.ca2.oraclecloud.com/hcmUI/CandidateExperience/en/sites/CX?utm_source=work-at-ghd&amp;utm_medium=hero-button&amp;utm_campaign=Careers-Search-Apply ">
            <text:p>https://ejov.fa.ca2.oraclecloud.com/hcmUI/CandidateExperience/en/sites/CX?utm_source=work-at-ghd&amp;utm_medium=hero-button&amp;utm_campaign=Careers-Search-Apply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RedBull">
            <text:p>RedBull</text:p>
          </table:table-cell>
          <table:table-cell office:value-type="string" office:string-value="https://careers.redbullracing.com/en/sites/CX_2 ">
            <text:p>https://careers.redbullracing.com/en/sites/CX_2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cadillac">
            <text:p>cadillac</text:p>
          </table:table-cell>
          <table:table-cell office:value-type="string" office:string-value="https://opportunities.cadillacf1team.com/en/ ">
            <text:p>https://opportunities.cadillacf1team.com/en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llegis">
            <text:p>Allegis</text:p>
          </table:table-cell>
          <table:table-cell office:value-type="string" office:string-value="https://www.allegisglobalsolutions.com/en/about-us/jobs ">
            <text:p>https://www.allegisglobalsolutions.com/en/about-us/jobs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Stirling Dyn">
            <text:p>Stirling Dyn</text:p>
          </table:table-cell>
          <table:table-cell office:value-type="string" office:string-value="https://stirlingdynamics-jobs-expleo.icims.com/jobs/search?ss=1&amp;mobile=false&amp;width=1265&amp;height=500&amp;bga=true&amp;needsRedirect=false&amp;jan1offset=60&amp;jun1offset=120">
            <text:p>https://stirlingdynamics-jobs-expleo.icims.com/jobs/search?ss=1&amp;mobile=false&amp;width=1265&amp;height=500&amp;bga=true&amp;needsRedirect=false&amp;jan1offset=60&amp;jun1offset=120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Type One Energy">
            <text:p>Type One Energy</text:p>
          </table:table-cell>
          <table:table-cell office:value-type="string" office:string-value="https://typeoneenergy.com/careers/ ">
            <text:p>https://typeoneenergy.com/careers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PhysicsX">
            <text:p>PhysicsX</text:p>
          </table:table-cell>
          <table:table-cell office:value-type="string" office:string-value="https://job-boards.eu.greenhouse.io/physicsx">
            <text:p>https://job-boards.eu.greenhouse.io/physicsx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bda">
            <text:p>Mbda</text:p>
          </table:table-cell>
          <table:table-cell office:value-type="string" office:string-value=" https://www.mbda-careers.de/karriere/stellenangebote/ ">
            <text:p> https://www.mbda-careers.de/karriere/stellenangebote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cron">
            <text:p>Acron</text:p>
          </table:table-cell>
          <table:table-cell office:value-type="string" office:string-value="https://workforcenow.adp.com/mascsr/default/mdf/recruitment/recruitment.html?cid=d0f6f3fc-e22e-48cc-8d92-107e52c30ed5&amp;ccId=9200985831336_2&amp;lang=en_US ">
            <text:p>https://workforcenow.adp.com/mascsr/default/mdf/recruitment/recruitment.html?cid=d0f6f3fc-e22e-48cc-8d92-107e52c30ed5&amp;ccId=9200985831336_2&amp;lang=en_US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TechnicFMC">
            <text:p>TechnicFMC</text:p>
          </table:table-cell>
          <table:table-cell office:value-type="string" office:string-value="https://careers.technipfmc.com/search ">
            <text:p>https://careers.technipfmc.com/search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Novo">
            <text:p>Novo</text:p>
          </table:table-cell>
          <table:table-cell office:value-type="string" office:string-value="https://careers.novonordisk.com/job/Lyngby-CFD-Engineering-Intern-Capi/1400359433/?feedId=300201&amp;utm_source=LinkedInJobPostings&amp;tcsource=Apply">
            <text:p>https://careers.novonordisk.com/job/Lyngby-CFD-Engineering-Intern-Capi/1400359433/?feedId=300201&amp;utm_source=LinkedInJobPostings&amp;tcsource=Apply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iro">
            <text:p>Viro</text:p>
          </table:table-cell>
          <table:table-cell office:value-type="string" office:string-value="https://careers.viro-group.com/de/suche">
            <text:p>https://careers.viro-group.com/de/such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iTime">
            <text:p>SiTime</text:p>
          </table:table-cell>
          <table:table-cell office:value-type="string" office:string-value="https://www.sitime.com/job-listings">
            <text:p>https://www.sitime.com/job-list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MC">
            <text:p>TMC</text:p>
          </table:table-cell>
          <table:table-cell office:value-type="string" office:string-value="https://www.themembercompany.com/careers">
            <text:p>https://www.themembercompany.com/career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awn aero">
            <text:p>Dawn aero</text:p>
          </table:table-cell>
          <table:table-cell office:value-type="string" office:string-value="https://job-boards.anz.greenhouse.io/dawnaerospace">
            <text:p>https://job-boards.anz.greenhouse.io/dawnaerospac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WD">
            <text:p>TWD</text:p>
          </table:table-cell>
          <table:table-cell office:value-type="string" office:string-value="https://careers.twd.nl/job-openings">
            <text:p>https://careers.twd.nl/job-open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ulzer">
            <text:p>Sulzer</text:p>
          </table:table-cell>
          <table:table-cell office:value-type="string" office:string-value="https://sulzer.wd502.myworkdayjobs.com/SulzerJobs?_gl=1*appxrx*_ga*MTA5ODExMTU3NS4xNzgwNTk5NjM2*_ga_8458H4ET1R*czE3ODA1OTk2MzQkbzEkZzAkdDE3ODA1OTk2NDEkajU2JGwwJGgw*_gcl_au*MTQ3OTk2MDc2LjE3ODA1OTk2Mzg.">
            <text:p>https://sulzer.wd502.myworkdayjobs.com/SulzerJobs?_gl=1*appxrx*_ga*MTA5ODExMTU3NS4xNzgwNTk5NjM2*_ga_8458H4ET1R*czE3ODA1OTk2MzQkbzEkZzAkdDE3ODA1OTk2NDEkajU2JGwwJGgw*_gcl_au*MTQ3OTk2MDc2LjE3ODA1OTk2Mzg.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pson">
            <text:p>Epson</text:p>
          </table:table-cell>
          <table:table-cell office:value-type="string" office:string-value="https://jobs.epson.eu/?ot_preferences=C0004%3A1%2CC0003%3A1%2CC0002%3A1%2CC0001%3A1&amp;adobe_mc=MCMID%3D14653130397806829223455958921558755594%7CMCORGID%3DC6DD45815AE6DFFD0A495D24%40AdobeOrg%7CTS%3D1780600471">
            <text:p>https://jobs.epson.eu/?ot_preferences=C0004%3A1%2CC0003%3A1%2CC0002%3A1%2CC0001%3A1&amp;adobe_mc=MCMID%3D14653130397806829223455958921558755594%7CMCORGID%3DC6DD45815AE6DFFD0A495D24%40AdobeOrg%7CTS%3D1780600471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Avnet">
            <text:p>Avnet</text:p>
          </table:table-cell>
          <table:table-cell office:value-type="string" office:string-value="https://wd1.myworkdaysite.com/recruiting/avnet/External">
            <text:p>https://wd1.myworkdaysite.com/recruiting/avnet/Externa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nter BV">
            <text:p>Enter BV</text:p>
          </table:table-cell>
          <table:table-cell office:value-type="string" office:string-value="https://www.enter-group.nl/en/vacancies">
            <text:p>https://www.enter-group.nl/en/vacancie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BrinK">
            <text:p>BrinK</text:p>
          </table:table-cell>
          <table:table-cell office:value-type="string" office:string-value="https://brinks-careers.com/">
            <text:p>https://brinks-careers.com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Gradyent">
            <text:p>Gradyent</text:p>
          </table:table-cell>
          <table:table-cell office:value-type="string" office:string-value="https://job-boards.eu.greenhouse.io/gradyent?gh_src=LinkedIn">
            <text:p>https://job-boards.eu.greenhouse.io/gradyent?gh_src=LinkedIn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efenture">
            <text:p>Defenture</text:p>
          </table:table-cell>
          <table:table-cell office:value-type="string" office:string-value="https://werkenbijdefenture.nl/vacatures?#vacancy-overview">
            <text:p>https://werkenbijdefenture.nl/vacatures?#vacancy-overview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Jacobs">
            <text:p>Jacobs</text:p>
          </table:table-cell>
          <table:table-cell office:value-type="string" office:string-value="https://careers.jacobs.com/en_US/careers/Home">
            <text:p>https://careers.jacobs.com/en_US/careers/Home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string" office:string-value="Job">
            <text:p>Job</text:p>
          </table:table-cell>
          <table:table-cell office:value-type="string" office:string-value="Merkle">
            <text:p>Merkle</text:p>
          </table:table-cell>
          <table:table-cell office:value-type="string" office:string-value="https://merkle-cae-solutions.talentstorm.de/stellenangebote">
            <text:p>https://merkle-cae-solutions.talentstorm.de/stellenangebote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string" office:string-value="Job">
            <text:p>Job</text:p>
          </table:table-cell>
          <table:table-cell office:value-type="string" office:string-value="Enginsoft">
            <text:p>Enginsoft</text:p>
          </table:table-cell>
          <table:table-cell office:value-type="string" office:string-value="https://www.enginsoft.com/careers/">
            <text:p>https://www.enginsoft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uneer">
            <text:p>Simuneer</text:p>
          </table:table-cell>
          <table:table-cell office:value-type="string" office:string-value="https://simuneer.de/en/careers/">
            <text:p>https://simuneer.de/en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scale">
            <text:p>Simscale</text:p>
          </table:table-cell>
          <table:table-cell office:value-type="string" office:string-value="https://www.simscale.com/jobs/#openings">
            <text:p>https://www.simscale.com/jobs/#opening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conext">
            <text:p>Aconext</text:p>
          </table:table-cell>
          <table:table-cell office:value-type="string" office:string-value="https://aconext.de/en/career/">
            <text:p>https://aconext.de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ode and schwarz">
            <text:p>rhode and schwarz</text:p>
          </table:table-cell>
          <table:table-cell office:value-type="string" office:string-value="https://www.rohde-schwarz.com/de/karriere/stellenangebote/karriere-stellenangebote_251573.html">
            <text:p>https://www.rohde-schwarz.com/de/karriere/stellenangebote/karriere-stellenangebote_251573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rup">
            <text:p>Arup</text:p>
          </table:table-cell>
          <table:table-cell office:value-type="string" office:string-value="https://jobs.arup.com/jobs/search/19609985">
            <text:p>https://jobs.arup.com/jobs/search/19609985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 Global">
            <text:p>TE Global</text:p>
          </table:table-cell>
          <table:table-cell office:value-type="string" office:string-value="http://careers.te.com/">
            <text:p>http://careers.t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lver atena">
            <text:p>Silver atena</text:p>
          </table:table-cell>
          <table:table-cell office:value-type="string" office:string-value="https://karriere.silver-atena.de/stellenangebote">
            <text:p>https://karriere.silver-atena.de/stellenangebote</text:p>
          </table:table-cell>
        </table:table-row>
      </table:table>
      <table:table table:name="Sheet2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University of Siegen">
            <text:p>University of Siegen</text:p>
          </table:table-cell>
          <table:table-cell office:value-type="string" office:string-value="https://jobs.uni-siegen.de/search/?createNewAlert=false&amp;q=&amp;optionsFacetsDD_customfield2=&amp;optionsFacetsDD_customfield1=&amp;optionsFacetsDD_customfield4=">
            <text:p>https://jobs.uni-siegen.de/search/?createNewAlert=false&amp;q=&amp;optionsFacetsDD_customfield2=&amp;optionsFacetsDD_customfield1=&amp;optionsFacetsDD_customfield4=</text:p>
          </table:table-cell>
        </table:table-row>
        <table:table-row>
          <table:table-cell office:value-type="string" office:string-value="Germany ">
            <text:p>Germany </text:p>
          </table:table-cell>
          <table:table-cell office:value-type="string" office:string-value="Job">
            <text:p>Job</text:p>
          </table:table-cell>
          <table:table-cell office:value-type="string" office:string-value="TU Dresden">
            <text:p>TU Dresden</text:p>
          </table:table-cell>
          <table:table-cell office:value-type="string" office:string-value="https://tu-dresden.de/tu-dresden/arbeiten-an-der-tud/stellenangebote/stellenangebote?lang=en&amp;style=cms2&amp;suche=1">
            <text:p>https://tu-dresden.de/tu-dresden/arbeiten-an-der-tud/stellenangebote/stellenangebote?lang=en&amp;style=cms2&amp;suche=1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U Braunschweig Portal">
            <text:p>TU Braunschweig Portal</text:p>
          </table:table-cell>
          <table:table-cell office:value-type="string" office:string-value="https://stellenticket.tu-braunschweig.de/stellenangebote">
            <text:p>https://stellenticket.tu-braunschweig.de/stellenangebo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