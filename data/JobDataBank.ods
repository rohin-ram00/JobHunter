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#E7E6E6"/>
    </style:style>
    <style:style style:name="ce5" style:family="table-cell" style:parent-style-name="Hyperlink" style:data-style-name="N0">
      <style:table-cell-properties fo:background-color="#E7E6E6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17.383125cm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Career_UR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oith</text:p>
          </table:table-cell>
          <table:table-cell office:value-type="string" table:style-name="ce3">
            <text:p><text:a xlink:href="../JobDataBank.ods">https://jobs.voith.com/</text:a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Grob Aircraft</text:p>
          </table:table-cell>
          <table:table-cell office:value-type="string" table:style-name="ce5">
            <text:p>https://jobs.grob-aircraf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rager</text:p>
          </table:table-cell>
          <table:table-cell office:value-type="string" table:style-name="ce3">
            <text:p>https://www.draeger.com/de_de/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ana lim</text:p>
          </table:table-cell>
          <table:table-cell office:value-type="string" table:style-name="ce3">
            <text:p>https://jobs.dana.com/go/View-All-Jobs/9152900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olkswagen</text:p>
          </table:table-cell>
          <table:table-cell office:value-type="string" table:style-name="ce3">
            <text:p>https://jobs.volkswagen-group.com/Volkswagen-Group-Services/search/?locale=de_D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Eppendorf</text:p>
          </table:table-cell>
          <table:table-cell office:value-type="string" table:style-name="ce5">
            <text:p>https://www.eppendorf.com/de-en/company-careers/career/job-porta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liebherr</text:p>
          </table:table-cell>
          <table:table-cell office:value-type="string" table:style-name="ce3">
            <text:p>https://www.liebherr.com/en-int/careers/careers-53706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olaris</text:p>
          </table:table-cell>
          <table:table-cell office:value-type="string" table:style-name="ce3">
            <text:p>https://www.polaris-raumflugzeuge.de/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lten</text:p>
          </table:table-cell>
          <table:table-cell office:value-type="string" table:style-name="ce3">
            <text:p>https://www.alten-germany.de/en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ertical Aerospace</text:p>
          </table:table-cell>
          <table:table-cell office:value-type="string" table:style-name="ce3">
            <text:p>https://vertical-aerospace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I</text:p>
          </table:table-cell>
          <table:table-cell office:value-type="string" table:style-name="ce3">
            <text:p>https://sii-group.de/en/career-porta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afran</text:p>
          </table:table-cell>
          <table:table-cell office:value-type="string" table:style-name="ce3">
            <text:p>https://www.safran-group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P Mannheim</text:p>
          </table:table-cell>
          <table:table-cell office:value-type="string" table:style-name="ce3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erzen</text:p>
          </table:table-cell>
          <table:table-cell office:value-type="string" table:style-name="ce3">
            <text:p>https://www.aerzen.com/career/job-off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avana GMbh</text:p>
          </table:table-cell>
          <table:table-cell office:value-type="string" table:style-name="ce3">
            <text:p>https://karriere.pavana-wind.com/job-offers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3DS</text:p>
          </table:table-cell>
          <table:table-cell office:value-type="string" table:style-name="ce3">
            <text:p>https://www.3ds.com/careers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verllence</text:p>
          </table:table-cell>
          <table:table-cell office:value-type="string" table:style-name="ce3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Kreisel</text:p>
          </table:table-cell>
          <table:table-cell office:value-type="string" table:style-name="ce3">
            <text:p>https://www.kreisel.eu/en/career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udi</text:p>
          </table:table-cell>
          <table:table-cell office:value-type="string" table:style-name="ce3">
            <text:p>https://careers.audi.com/desktop.html#/SEARCH/SIMPL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emens</text:p>
          </table:table-cell>
          <table:table-cell office:value-type="string" table:style-name="ce3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MW</text:p>
          </table:table-cell>
          <table:table-cell office:value-type="string" table:style-name="ce3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AE sys</text:p>
          </table:table-cell>
          <table:table-cell office:value-type="string" table:style-name="ce3">
            <text:p>https://jobsearch.baesystems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ASF</text:p>
          </table:table-cell>
          <table:table-cell office:value-type="string" table:style-name="ce3">
            <text:p>https://www.basf.com/global/en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mtecto</text:p>
          </table:table-cell>
          <table:table-cell office:value-type="string" table:style-name="ce3">
            <text:p>https://www.simtecto.de/jobs-karriere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GR</text:p>
          </table:table-cell>
          <table:table-cell office:value-type="string" table:style-name="ce3">
            <text:p>https://careers.tgr-europe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AV</text:p>
          </table:table-cell>
          <table:table-cell office:value-type="string" table:style-name="ce3">
            <text:p>https://www.iav.com/career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amboll</text:p>
          </table:table-cell>
          <table:table-cell office:value-type="string" table:style-name="ce3">
            <text:p>https://www.ramboll.com/de-de/karri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gentur fur arbeit</text:p>
          </table:table-cell>
          <table:table-cell office:value-type="string" table:style-name="ce3">
            <text:p><text:a xlink:href="https://www.arbeitsagentur.de/jobsuche/suche?angebotsart=1&amp;was=cfd">https://www.arbeitsagentur.de/jobsuche/suche?angebotsart=1&amp;was=cfd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S Dynamic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IP Services</text:p>
          </table:table-cell>
          <table:table-cell office:value-type="string" table:style-name="ce3">
            <text:p><text:a xlink:href="../JobDataBank.ods">https://www.aip-services.de/aip-karriere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Orange engineering</text:p>
          </table:table-cell>
          <table:table-cell office:value-type="string" table:style-name="ce3">
            <text:p>https://orange.jobs/gb/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KRZ</text:p>
          </table:table-cell>
          <table:table-cell office:value-type="string" table:style-name="ce3">
            <text:p>https://www.dkrz.de/de/about/stellenangebo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ocket Factory</text:p>
          </table:table-cell>
          <table:table-cell office:value-type="string" table:style-name="ce3">
            <text:p>https://job-boards.eu.greenhouse.io/rocketfactoryaugsburga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LR</text:p>
          </table:table-cell>
          <table:table-cell office:value-type="string" table:style-name="ce3">
            <text:p>https://jobs.dlr.de/go/All-Jobs/9291501/?markerViewed=&amp;carouselIndex=&amp;facetFilters=%7B%22mfield1%22%3A%5B%22Graduates%22%5D%7D&amp;pageNumber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MTU</text:p>
          </table:table-cell>
          <table:table-cell office:value-type="string" table:style-name="ce3">
            <text:p>https://www.mtu.de/careers/online-job-market/s/all/all/all/al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Kelvion</text:p>
          </table:table-cell>
          <table:table-cell office:value-type="string" table:style-name="ce3">
            <text:p>https://www.kelvion.com/de/karrier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OTTO fuchs</text:p>
          </table:table-cell>
          <table:table-cell office:value-type="string" table:style-name="ce3">
            <text:p>https://www.otto-fuchs.com/de/karrier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lasmatreat</text:p>
          </table:table-cell>
          <table:table-cell office:value-type="string" table:style-name="ce3">
            <text:p>https://jobs.plasmatreat.de/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Ziehl</text:p>
          </table:table-cell>
          <table:table-cell office:value-type="string" table:style-name="ce3">
            <text:p>https://karriere.ziehl-abegg.d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heinmetal</text:p>
          </table:table-cell>
          <table:table-cell office:value-type="string" table:style-name="ce3">
            <text:p>https://www.rheinmetall.com/en/career/vacanc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hyssenkurp</text:p>
          </table:table-cell>
          <table:table-cell office:value-type="string" table:style-name="ce3">
            <text:p>https://karriere.thyssenkrupp.com/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 power systems</text:p>
          </table:table-cell>
          <table:table-cell office:value-type="string" table:style-name="ce3">
            <text:p>https://www.e-powerinternationa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DAG</text:p>
          </table:table-cell>
          <table:table-cell office:value-type="string" table:style-name="ce3">
            <text:p>https://www.edag.com/en/career/vacanc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ÒKAPI</text:p>
          </table:table-cell>
          <table:table-cell office:value-type="string" table:style-name="ce3">
            <text:p>https://okapiorbits.jobs.personio.d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NERCON</text:p>
          </table:table-cell>
          <table:table-cell office:value-type="string" table:style-name="ce3">
            <text:p><text:a xlink:href="../JobDataBank.xml">https://career.enercon.de/go/all-open-positions/9233655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FI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CS compu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lycademy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CFX berlin</text:p>
          </table:table-cell>
          <table:table-cell office:value-type="string" table:style-name="ce3">
            <text:p>https://www.cfx-berlin.de/cfx-berlin/stellenangebo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SAR aerospac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ESA</text:p>
          </table:table-cell>
          <table:table-cell office:value-type="string" table:style-name="ce3">
            <text:p>https://www.tesa.com/en/about-tesa/career/current-vacancies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Helsing</text:p>
          </table:table-cell>
          <table:table-cell office:value-type="string" table:style-name="ce3">
            <text:p>https://helsing.ai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ERSCHAU</text:p>
          </table:table-cell>
          <table:table-cell office:value-type="string" table:style-name="ce3">
            <text:p>https://touch.ferchau.com/de/de?type=3&amp;experienceLevel%5B0%5D=5&amp;sortingType=actuality&amp;sortingDirection=DES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ACE aerospace</text:p>
          </table:table-cell>
          <table:table-cell office:value-type="string" table:style-name="ce3">
            <text:p>https://www.pace.de/pace-join-our-miss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ermany</text:p>
          </table:table-cell>
          <table:table-cell office:value-type="string" table:style-name="ce6">
            <text:p>Job</text:p>
          </table:table-cell>
          <table:table-cell office:value-type="string" table:style-name="ce6">
            <text:p>Airbus</text:p>
          </table:table-cell>
          <table:table-cell office:value-type="string" table:style-name="ce7">
            <text:p>https://www.airbus.com/en/careers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raunhofer</text:p>
          </table:table-cell>
          <table:table-cell office:value-type="string" table:style-name="ce3">
            <text:p><text:a xlink:href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Helmholtz</text:p>
          </table:table-cell>
          <table:table-cell office:value-type="string" table:style-name="ce3">
            <text:p><text:a xlink:href="https://www.helmholtz.de/en/career/job-vacancies/">https://www.helmholtz.de/en/career/job-vacancies/</text:a></text:p>
          </table:table-cell>
          <table:table-cell table:number-columns-repeated="16380"/>
        </table:table-row>
        <table:table-row table:number-rows-repeated="11" table:style-name="ro1">
          <table:table-cell table:number-columns-repeated="16384"/>
        </table:table-row>
        <table:table-row table:number-rows-repeated="5" table:style-name="ro1">
          <table:table-cell office:value-type="string" table:style-name="ce1">
            <text:p>Netherlands</text:p>
          </table:table-cell>
          <table:table-cell table:number-columns-repeated="16383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30026</meta:generator>
    <meta:initial-creator>Rohin Ramisetty</meta:initial-creator>
    <dc:creator>Rohin Ramisetty</dc:creator>
    <meta:creation-date>2026-06-01T19:54:17Z</meta:creation-date>
    <dc:date>2026-06-04T00:38:02Z</dc:date>
    <meta:editing-duration>PT0S</meta:editing-duration>
  </office:meta>
</office:document-meta>
</file>