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Merkle">
            <text:p>Merkle</text:p>
          </table:table-cell>
          <table:table-cell office:value-type="string" office:string-value="https://merkle-cae-solutions.talentstorm.de/stellenangebote">
            <text:p>https://merkle-cae-solutions.talentstorm.de/stellenangebot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Enginsoft">
            <text:p>Enginsoft</text:p>
          </table:table-cell>
          <table:table-cell office:value-type="string" office:string-value="https://www.enginsoft.com/careers/">
            <text:p>https://www.enginsoft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uneer">
            <text:p>Simuneer</text:p>
          </table:table-cell>
          <table:table-cell office:value-type="string" office:string-value="https://simuneer.de/en/careers/">
            <text:p>https://simuneer.de/en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scale">
            <text:p>Simscale</text:p>
          </table:table-cell>
          <table:table-cell office:value-type="string" office:string-value="https://www.simscale.com/jobs/#openings">
            <text:p>https://www.simscale.com/jobs/#opening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conext">
            <text:p>Aconext</text:p>
          </table:table-cell>
          <table:table-cell office:value-type="string" office:string-value="https://aconext.de/en/career/">
            <text:p>https://aconext.de/en/career/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