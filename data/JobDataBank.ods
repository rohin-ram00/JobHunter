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Hasoning">
            <text:p>Hasoning</text:p>
          </table:table-cell>
          <table:table-cell office:value-type="string" office:string-value="https://www.haskoning.com/en/careers/vacancies">
            <text:p>https://www.haskoning.com/en/careers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Novo">
            <text:p>Novo</text:p>
          </table:table-cell>
          <table:table-cell office:value-type="string" office:string-value="https://careers.novonordisk.com/job/Lyngby-CFD-Engineering-Intern-Capi/1400359433/?feedId=300201&amp;utm_source=LinkedInJobPostings&amp;tcsource=Apply">
            <text:p>https://careers.novonordisk.com/job/Lyngby-CFD-Engineering-Intern-Capi/1400359433/?feedId=300201&amp;utm_source=LinkedInJobPostings&amp;tcsource=Apply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iro">
            <text:p>Viro</text:p>
          </table:table-cell>
          <table:table-cell office:value-type="string" office:string-value="https://careers.viro-group.com/de/suche">
            <text:p>https://careers.viro-group.com/de/such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iTime">
            <text:p>SiTime</text:p>
          </table:table-cell>
          <table:table-cell office:value-type="string" office:string-value="https://www.sitime.com/job-listings">
            <text:p>https://www.sitime.com/job-list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MC">
            <text:p>TMC</text:p>
          </table:table-cell>
          <table:table-cell office:value-type="string" office:string-value="https://www.themembercompany.com/careers">
            <text:p>https://www.themembercompany.com/career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awn aero">
            <text:p>Dawn aero</text:p>
          </table:table-cell>
          <table:table-cell office:value-type="string" office:string-value="https://job-boards.anz.greenhouse.io/dawnaerospace">
            <text:p>https://job-boards.anz.greenhouse.io/dawnaerospac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WD">
            <text:p>TWD</text:p>
          </table:table-cell>
          <table:table-cell office:value-type="string" office:string-value="https://careers.twd.nl/job-openings">
            <text:p>https://careers.twd.nl/job-open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ulzer">
            <text:p>Sulzer</text:p>
          </table:table-cell>
          <table:table-cell office:value-type="string" office:string-value="https://sulzer.wd502.myworkdayjobs.com/SulzerJobs?_gl=1*appxrx*_ga*MTA5ODExMTU3NS4xNzgwNTk5NjM2*_ga_8458H4ET1R*czE3ODA1OTk2MzQkbzEkZzAkdDE3ODA1OTk2NDEkajU2JGwwJGgw*_gcl_au*MTQ3OTk2MDc2LjE3ODA1OTk2Mzg.">
            <text:p>https://sulzer.wd502.myworkdayjobs.com/SulzerJobs?_gl=1*appxrx*_ga*MTA5ODExMTU3NS4xNzgwNTk5NjM2*_ga_8458H4ET1R*czE3ODA1OTk2MzQkbzEkZzAkdDE3ODA1OTk2NDEkajU2JGwwJGgw*_gcl_au*MTQ3OTk2MDc2LjE3ODA1OTk2Mzg.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pson">
            <text:p>Epson</text:p>
          </table:table-cell>
          <table:table-cell office:value-type="string" office:string-value="https://jobs.epson.eu/?ot_preferences=C0004%3A1%2CC0003%3A1%2CC0002%3A1%2CC0001%3A1&amp;adobe_mc=MCMID%3D14653130397806829223455958921558755594%7CMCORGID%3DC6DD45815AE6DFFD0A495D24%40AdobeOrg%7CTS%3D1780600471">
            <text:p>https://jobs.epson.eu/?ot_preferences=C0004%3A1%2CC0003%3A1%2CC0002%3A1%2CC0001%3A1&amp;adobe_mc=MCMID%3D14653130397806829223455958921558755594%7CMCORGID%3DC6DD45815AE6DFFD0A495D24%40AdobeOrg%7CTS%3D1780600471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Avnet">
            <text:p>Avnet</text:p>
          </table:table-cell>
          <table:table-cell office:value-type="string" office:string-value="https://wd1.myworkdaysite.com/recruiting/avnet/External">
            <text:p>https://wd1.myworkdaysite.com/recruiting/avnet/Externa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nter BV">
            <text:p>Enter BV</text:p>
          </table:table-cell>
          <table:table-cell office:value-type="string" office:string-value="https://www.enter-group.nl/en/vacancies">
            <text:p>https://www.enter-group.nl/en/vacancie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BrinK">
            <text:p>BrinK</text:p>
          </table:table-cell>
          <table:table-cell office:value-type="string" office:string-value="https://brinks-careers.com/">
            <text:p>https://brinks-careers.com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Gradyent">
            <text:p>Gradyent</text:p>
          </table:table-cell>
          <table:table-cell office:value-type="string" office:string-value="https://job-boards.eu.greenhouse.io/gradyent?gh_src=LinkedIn">
            <text:p>https://job-boards.eu.greenhouse.io/gradyent?gh_src=LinkedIn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efenture">
            <text:p>Defenture</text:p>
          </table:table-cell>
          <table:table-cell office:value-type="string" office:string-value="https://werkenbijdefenture.nl/vacatures?#vacancy-overview">
            <text:p>https://werkenbijdefenture.nl/vacatures?#vacancy-overview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Jacobs">
            <text:p>Jacobs</text:p>
          </table:table-cell>
          <table:table-cell office:value-type="string" office:string-value="https://careers.jacobs.com/en_US/careers/Home">
            <text:p>https://careers.jacobs.com/en_US/careers/Hom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Merkle">
            <text:p>Merkle</text:p>
          </table:table-cell>
          <table:table-cell office:value-type="string" office:string-value="https://merkle-cae-solutions.talentstorm.de/stellenangebote">
            <text:p>https://merkle-cae-solutions.talentstorm.de/stellenangebot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Enginsoft">
            <text:p>Enginsoft</text:p>
          </table:table-cell>
          <table:table-cell office:value-type="string" office:string-value="https://www.enginsoft.com/careers/">
            <text:p>https://www.enginsoft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uneer">
            <text:p>Simuneer</text:p>
          </table:table-cell>
          <table:table-cell office:value-type="string" office:string-value="https://simuneer.de/en/careers/">
            <text:p>https://simuneer.de/en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scale">
            <text:p>Simscale</text:p>
          </table:table-cell>
          <table:table-cell office:value-type="string" office:string-value="https://www.simscale.com/jobs/#openings">
            <text:p>https://www.simscale.com/jobs/#opening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conext">
            <text:p>Aconext</text:p>
          </table:table-cell>
          <table:table-cell office:value-type="string" office:string-value="https://aconext.de/en/career/">
            <text:p>https://aconext.de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ode and schwarz">
            <text:p>rhode and schwarz</text:p>
          </table:table-cell>
          <table:table-cell office:value-type="string" office:string-value="https://www.rohde-schwarz.com/de/karriere/stellenangebote/karriere-stellenangebote_251573.html">
            <text:p>https://www.rohde-schwarz.com/de/karriere/stellenangebote/karriere-stellenangebote_251573.html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