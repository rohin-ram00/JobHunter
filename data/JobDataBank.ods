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dc="http://purl.org/dc/elements/1.1/" xmlns:style="urn:oasis:names:tc:opendocument:xmlns:style:1.0" xmlns:fo="urn:oasis:names:tc:opendocument:xmlns:xsl-fo-compatible:1.0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dc="http://purl.org/dc/elements/1.1/" xmlns:style="urn:oasis:names:tc:opendocument:xmlns:style:1.0" xmlns:fo="urn:oasis:names:tc:opendocument:xmlns:xsl-fo-compatible:1.0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office:version="1.2">
  <office:automatic-styles/>
  <office:body>
    <office:spreadsheet>
      <table:table table:name="Sheet1">
        <table:table-row>
          <table:table-cell office:value-type="string" office:string-value="Country">
            <text:p>Country</text:p>
          </table:table-cell>
          <table:table-cell office:value-type="string" office:string-value="Type">
            <text:p>Type</text:p>
          </table:table-cell>
          <table:table-cell office:value-type="string" office:string-value="Company">
            <text:p>Company</text:p>
          </table:table-cell>
          <table:table-cell office:value-type="string" office:string-value="Career_URL">
            <text:p>Career_URL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Voith">
            <text:p>Voith</text:p>
          </table:table-cell>
          <table:table-cell office:value-type="string" office:string-value="https://jobs.voith.com/">
            <text:p>https://jobs.voith.com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Grob Aircraft">
            <text:p>Grob Aircraft</text:p>
          </table:table-cell>
          <table:table-cell office:value-type="string" office:string-value="https://jobs.grob-aircraft.com/jobs">
            <text:p>https://jobs.grob-aircraft.com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Drager">
            <text:p>Drager</text:p>
          </table:table-cell>
          <table:table-cell office:value-type="string" office:string-value="https://www.draeger.com/de_de/Career">
            <text:p>https://www.draeger.com/de_de/Career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Dana lim">
            <text:p>Dana lim</text:p>
          </table:table-cell>
          <table:table-cell office:value-type="string" office:string-value="https://jobs.dana.com/go/View-All-Jobs/9152900/">
            <text:p>https://jobs.dana.com/go/View-All-Jobs/9152900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volkswagen">
            <text:p>volkswagen</text:p>
          </table:table-cell>
          <table:table-cell office:value-type="string" office:string-value="https://jobs.volkswagen-group.com/Volkswagen-Group-Services/search/?locale=de_DE">
            <text:p>https://jobs.volkswagen-group.com/Volkswagen-Group-Services/search/?locale=de_D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ppendorf">
            <text:p>Eppendorf</text:p>
          </table:table-cell>
          <table:table-cell office:value-type="string" office:string-value="https://www.eppendorf.com/de-en/company-careers/career/job-portal/">
            <text:p>https://www.eppendorf.com/de-en/company-careers/career/job-portal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liebherr">
            <text:p>liebherr</text:p>
          </table:table-cell>
          <table:table-cell office:value-type="string" office:string-value="https://www.liebherr.com/en-int/careers/careers-5370600">
            <text:p>https://www.liebherr.com/en-int/careers/careers-5370600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Polaris">
            <text:p>Polaris</text:p>
          </table:table-cell>
          <table:table-cell office:value-type="string" office:string-value="https://www.polaris-raumflugzeuge.de/career">
            <text:p>https://www.polaris-raumflugzeuge.de/career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lten">
            <text:p>Alten</text:p>
          </table:table-cell>
          <table:table-cell office:value-type="string" office:string-value="https://www.alten-germany.de/en/jobs/">
            <text:p>https://www.alten-germany.de/en/jobs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Vertical Aerospace">
            <text:p>Vertical Aerospace</text:p>
          </table:table-cell>
          <table:table-cell office:value-type="string" office:string-value="https://vertical-aerospace.com/careers/">
            <text:p>https://vertical-aerospace.com/careers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II">
            <text:p>SII</text:p>
          </table:table-cell>
          <table:table-cell office:value-type="string" office:string-value="https://sii-group.de/en/career-portal/">
            <text:p>https://sii-group.de/en/career-portal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afran">
            <text:p>Safran</text:p>
          </table:table-cell>
          <table:table-cell office:value-type="string" office:string-value="https://www.safran-group.com/jobs">
            <text:p>https://www.safran-group.com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P Mannheim">
            <text:p>EP Mannheim</text:p>
          </table:table-cell>
          <table:table-cell office:value-type="string" office:string-value="https://www.ep-group.de/karriere/job-finden?utm_source=google_ads&amp;utm_campaign=g_ads_standorte&amp;keyword=job%20entwicklungsingenieur&amp;device=c&amp;network=g&amp;gad_source=1&amp;gad_campaignid=18597763329&amp;gbraid=0AAAAAByXapJHhe_g7avfyQJ_KzJnr4oVB&amp;gclid=Cj0KCQjw_vnQBhCxARIsADcZyxJj4PGTcd6VKpnCz7YPniJ6PILQHxagQH7Dh2lvvBwGVHPtEjXOYhAaAhEyEALw_wcB">
            <text:p>https://www.ep-group.de/karriere/job-finden?utm_source=google_ads&amp;utm_campaign=g_ads_standorte&amp;keyword=job%20entwicklungsingenieur&amp;device=c&amp;network=g&amp;gad_source=1&amp;gad_campaignid=18597763329&amp;gbraid=0AAAAAByXapJHhe_g7avfyQJ_KzJnr4oVB&amp;gclid=Cj0KCQjw_vnQBhCxARIsADcZyxJj4PGTcd6VKpnCz7YPniJ6PILQHxagQH7Dh2lvvBwGVHPtEjXOYhAaAhEyEALw_wcB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erzen">
            <text:p>Aerzen</text:p>
          </table:table-cell>
          <table:table-cell office:value-type="string" office:string-value="https://www.aerzen.com/career/job-offers">
            <text:p>https://www.aerzen.com/career/job-offer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Pavana GMbh">
            <text:p>Pavana GMbh</text:p>
          </table:table-cell>
          <table:table-cell office:value-type="string" office:string-value="https://karriere.pavana-wind.com/job-offers.html">
            <text:p>https://karriere.pavana-wind.com/job-offers.html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3DS">
            <text:p>3DS</text:p>
          </table:table-cell>
          <table:table-cell office:value-type="string" office:string-value="https://www.3ds.com/careers/jobs">
            <text:p>https://www.3ds.com/careers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verllence">
            <text:p>Everllence</text:p>
          </table:table-cell>
          <table:table-cell office:value-type="string" office:string-value="https://www.everllence.com/de/karriere?utm_medium=sea&amp;utm_source=google&amp;utm_campaign=always_ao_eb_de_e_260105&amp;utm_term=eb&amp;utm_content=link&amp;utm_medium=sea&amp;utm_source=google&amp;utm_campaign=always_ao_eb_de_e_260105&amp;utm_term=eb&amp;utm_content=link&amp;gad_source=1&amp;gad_campaignid=23575478370&amp;gbraid=0AAAAA-dbNDvyj0rXYEA6gHg_jPyVZ1m5G&amp;gclid=Cj0KCQjw_vnQBhCxARIsADcZyxKg9x-lK25xKq8jUYaWZEP1hx4CJ2d7r3oQoeqTgz0wOksdoto1MKYaAoEHEALw_wcB">
            <text:p>https://www.everllence.com/de/karriere?utm_medium=sea&amp;utm_source=google&amp;utm_campaign=always_ao_eb_de_e_260105&amp;utm_term=eb&amp;utm_content=link&amp;utm_medium=sea&amp;utm_source=google&amp;utm_campaign=always_ao_eb_de_e_260105&amp;utm_term=eb&amp;utm_content=link&amp;gad_source=1&amp;gad_campaignid=23575478370&amp;gbraid=0AAAAA-dbNDvyj0rXYEA6gHg_jPyVZ1m5G&amp;gclid=Cj0KCQjw_vnQBhCxARIsADcZyxKg9x-lK25xKq8jUYaWZEP1hx4CJ2d7r3oQoeqTgz0wOksdoto1MKYaAoEHEALw_wcB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Kreisel">
            <text:p>Kreisel</text:p>
          </table:table-cell>
          <table:table-cell office:value-type="string" office:string-value="https://www.kreisel.eu/en/career/">
            <text:p>https://www.kreisel.eu/en/career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udi">
            <text:p>Audi</text:p>
          </table:table-cell>
          <table:table-cell office:value-type="string" office:string-value="https://careers.audi.com/desktop.html#/SEARCH/SIMPLE/">
            <text:p>https://careers.audi.com/desktop.html#/SEARCH/SIMPLE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iemens">
            <text:p>Siemens</text:p>
          </table:table-cell>
          <table:table-cell office:value-type="string" office:string-value="https://jobs.siemens.com/en_US/externaljobs/SearchJobs/?42386=%5B812132%5D&amp;42386_format=17546&amp;42389=%5B39106405%2C144468627%2C102122%2C102134%2C102127%5D&amp;42389_format=17549&amp;42390=%5B102155%2C102156%2C102157%2C102158%5D&amp;42390_format=17550&amp;listFilterMode=1&amp;folderRecordsPerPage=9&amp;acz=1&amp;gad_source=1&amp;gad_campaignid=22145011592&amp;gbraid=0AAAAADEuPPMyJNgoWK6259Pvtj28zRinJ&amp;gclid=Cj0KCQjw_vnQBhCxARIsADcZyxJmEyEMgRhsNpWNBs2CTtWxpEEVypzsHBAepKJh_FJ6ZQbC6twdIlUaAodaEALw_wcB">
            <text:p>https://jobs.siemens.com/en_US/externaljobs/SearchJobs/?42386=%5B812132%5D&amp;42386_format=17546&amp;42389=%5B39106405%2C144468627%2C102122%2C102134%2C102127%5D&amp;42389_format=17549&amp;42390=%5B102155%2C102156%2C102157%2C102158%5D&amp;42390_format=17550&amp;listFilterMode=1&amp;folderRecordsPerPage=9&amp;acz=1&amp;gad_source=1&amp;gad_campaignid=22145011592&amp;gbraid=0AAAAADEuPPMyJNgoWK6259Pvtj28zRinJ&amp;gclid=Cj0KCQjw_vnQBhCxARIsADcZyxJmEyEMgRhsNpWNBs2CTtWxpEEVypzsHBAepKJh_FJ6ZQbC6twdIlUaAodaEALw_wcB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BMW">
            <text:p>BMW</text:p>
          </table:table-cell>
          <table:table-cell office:value-type="string" office:string-value="https://www.bmwgroup.jobs/de/de.html?clc={MarketingID}&amp;tl=sea-gl-SEA_BND_JOBS-mix-miy-.-sech-JOBS-.-p-bmw%20jobs-.-.&amp;clc=sea-gl-SEA_BND_JOBS-mix-JOBS&amp;gad_source=1&amp;gad_campaignid=12363556035&amp;gbraid=0AAAAADvNgksg-ogVU_Q69SROSPbou_eOY&amp;gclid=Cj0KCQjw_vnQBhCxARIsADcZyxIsDof2l4kdzsIPJhG4BlRJMK-LyAP6wa1U5HMvzOAn4EcRItUBwKQaAnrmEALw_wcB#location=DE&amp;&amp;jobType=STANDARD&amp;&amp;jobType=GRADUATE_JOB">
            <text:p>https://www.bmwgroup.jobs/de/de.html?clc={MarketingID}&amp;tl=sea-gl-SEA_BND_JOBS-mix-miy-.-sech-JOBS-.-p-bmw%20jobs-.-.&amp;clc=sea-gl-SEA_BND_JOBS-mix-JOBS&amp;gad_source=1&amp;gad_campaignid=12363556035&amp;gbraid=0AAAAADvNgksg-ogVU_Q69SROSPbou_eOY&amp;gclid=Cj0KCQjw_vnQBhCxARIsADcZyxIsDof2l4kdzsIPJhG4BlRJMK-LyAP6wa1U5HMvzOAn4EcRItUBwKQaAnrmEALw_wcB#location=DE&amp;&amp;jobType=STANDARD&amp;&amp;jobType=GRADUATE_JOB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BAE sys">
            <text:p>BAE sys</text:p>
          </table:table-cell>
          <table:table-cell office:value-type="string" office:string-value="https://jobsearch.baesystems.com/">
            <text:p>https://jobsearch.baesystems.com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BASF">
            <text:p>BASF</text:p>
          </table:table-cell>
          <table:table-cell office:value-type="string" office:string-value="https://www.basf.com/global/en/careers">
            <text:p>https://www.basf.com/global/en/career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imtecto">
            <text:p>Simtecto</text:p>
          </table:table-cell>
          <table:table-cell office:value-type="string" office:string-value="https://www.simtecto.de/jobs-karriere.html">
            <text:p>https://www.simtecto.de/jobs-karriere.html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TGR">
            <text:p>TGR</text:p>
          </table:table-cell>
          <table:table-cell office:value-type="string" office:string-value="https://careers.tgr-europe.com/">
            <text:p>https://careers.tgr-europe.com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IAV">
            <text:p>IAV</text:p>
          </table:table-cell>
          <table:table-cell office:value-type="string" office:string-value="https://www.iav.com/career/">
            <text:p>https://www.iav.com/career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Ramboll">
            <text:p>Ramboll</text:p>
          </table:table-cell>
          <table:table-cell office:value-type="string" office:string-value="https://www.ramboll.com/de-de/karriere">
            <text:p>https://www.ramboll.com/de-de/karrier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gentur fur arbeit">
            <text:p>Agentur fur arbeit</text:p>
          </table:table-cell>
          <table:table-cell office:value-type="string" office:string-value="https://www.arbeitsagentur.de/jobsuche/suche?angebotsart=1&amp;was=cfd">
            <text:p>https://www.arbeitsagentur.de/jobsuche/suche?angebotsart=1&amp;was=cfd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IP Services">
            <text:p>AIP Services</text:p>
          </table:table-cell>
          <table:table-cell office:value-type="string" office:string-value="https://www.aip-services.de/aip-karriere/">
            <text:p>https://www.aip-services.de/aip-karriere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Orange engineering">
            <text:p>Orange engineering</text:p>
          </table:table-cell>
          <table:table-cell office:value-type="string" office:string-value="https://orange.jobs/gb/en">
            <text:p>https://orange.jobs/gb/en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DKRZ">
            <text:p>DKRZ</text:p>
          </table:table-cell>
          <table:table-cell office:value-type="string" office:string-value="https://www.dkrz.de/de/about/stellenangebote">
            <text:p>https://www.dkrz.de/de/about/stellenangebot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Rocket Factory">
            <text:p>Rocket Factory</text:p>
          </table:table-cell>
          <table:table-cell office:value-type="string" office:string-value="https://job-boards.eu.greenhouse.io/rocketfactoryaugsburgag">
            <text:p>https://job-boards.eu.greenhouse.io/rocketfactoryaugsburgag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DLR">
            <text:p>DLR</text:p>
          </table:table-cell>
          <table:table-cell office:value-type="string" office:string-value="https://jobs.dlr.de/go/All-Jobs/9291501/?markerViewed=&amp;carouselIndex=&amp;facetFilters=%7B%22mfield1%22%3A%5B%22Graduates%22%5D%7D&amp;pageNumber=0">
            <text:p>https://jobs.dlr.de/go/All-Jobs/9291501/?markerViewed=&amp;carouselIndex=&amp;facetFilters=%7B%22mfield1%22%3A%5B%22Graduates%22%5D%7D&amp;pageNumber=0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MTU">
            <text:p>MTU</text:p>
          </table:table-cell>
          <table:table-cell office:value-type="string" office:string-value="https://www.mtu.de/careers/online-job-market/s/all/all/all/all/">
            <text:p>https://www.mtu.de/careers/online-job-market/s/all/all/all/all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Kelvion">
            <text:p>Kelvion</text:p>
          </table:table-cell>
          <table:table-cell office:value-type="string" office:string-value="https://www.kelvion.com/de/karriere/jobs">
            <text:p>https://www.kelvion.com/de/karriere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OTTO fuchs">
            <text:p>OTTO fuchs</text:p>
          </table:table-cell>
          <table:table-cell office:value-type="string" office:string-value="https://www.otto-fuchs.com/de/karriere/jobs">
            <text:p>https://www.otto-fuchs.com/de/karriere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Plasmatreat">
            <text:p>Plasmatreat</text:p>
          </table:table-cell>
          <table:table-cell office:value-type="string" office:string-value="https://jobs.plasmatreat.de/de">
            <text:p>https://jobs.plasmatreat.de/d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Ziehl">
            <text:p>Ziehl</text:p>
          </table:table-cell>
          <table:table-cell office:value-type="string" office:string-value="https://karriere.ziehl-abegg.de/jobs">
            <text:p>https://karriere.ziehl-abegg.de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Rheinmetal">
            <text:p>Rheinmetal</text:p>
          </table:table-cell>
          <table:table-cell office:value-type="string" office:string-value="https://www.rheinmetall.com/en/career/vacancies">
            <text:p>https://www.rheinmetall.com/en/career/vacancie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Thyssenkurp">
            <text:p>Thyssenkurp</text:p>
          </table:table-cell>
          <table:table-cell office:value-type="string" office:string-value="https://karriere.thyssenkrupp.com/en">
            <text:p>https://karriere.thyssenkrupp.com/en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 power systems">
            <text:p>e power systems</text:p>
          </table:table-cell>
          <table:table-cell office:value-type="string" office:string-value="https://www.e-powerinternational.com/careers">
            <text:p>https://www.e-powerinternational.com/career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DAG">
            <text:p>EDAG</text:p>
          </table:table-cell>
          <table:table-cell office:value-type="string" office:string-value="https://www.edag.com/en/career/vacancies">
            <text:p>https://www.edag.com/en/career/vacancie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ÒKAPI">
            <text:p>ÒKAPI</text:p>
          </table:table-cell>
          <table:table-cell office:value-type="string" office:string-value="https://okapiorbits.jobs.personio.de/">
            <text:p>https://okapiorbits.jobs.personio.de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NERCON">
            <text:p>ENERCON</text:p>
          </table:table-cell>
          <table:table-cell office:value-type="string" office:string-value="https://career.enercon.de/go/all-open-positions/9233655/">
            <text:p>https://career.enercon.de/go/all-open-positions/9233655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CFX berlin">
            <text:p>CFX berlin</text:p>
          </table:table-cell>
          <table:table-cell office:value-type="string" office:string-value="https://www.cfx-berlin.de/cfx-berlin/stellenangebote">
            <text:p>https://www.cfx-berlin.de/cfx-berlin/stellenangebot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TESA">
            <text:p>TESA</text:p>
          </table:table-cell>
          <table:table-cell office:value-type="string" office:string-value="https://www.tesa.com/en/about-tesa/career/current-vacancies?">
            <text:p>https://www.tesa.com/en/about-tesa/career/current-vacancies?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Helsing">
            <text:p>Helsing</text:p>
          </table:table-cell>
          <table:table-cell office:value-type="string" office:string-value="https://helsing.ai/jobs">
            <text:p>https://helsing.ai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FERSCHAU">
            <text:p>FERSCHAU</text:p>
          </table:table-cell>
          <table:table-cell office:value-type="string" office:string-value="https://touch.ferchau.com/de/de?type=3&amp;experienceLevel%5B0%5D=5&amp;sortingType=actuality&amp;sortingDirection=DESC">
            <text:p>https://touch.ferchau.com/de/de?type=3&amp;experienceLevel%5B0%5D=5&amp;sortingType=actuality&amp;sortingDirection=DESC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PACE aerospace">
            <text:p>PACE aerospace</text:p>
          </table:table-cell>
          <table:table-cell office:value-type="string" office:string-value="https://www.pace.de/pace-join-our-mission">
            <text:p>https://www.pace.de/pace-join-our-mission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irbus">
            <text:p>Airbus</text:p>
          </table:table-cell>
          <table:table-cell office:value-type="string" office:string-value="https://www.airbus.com/en/careers">
            <text:p>https://www.airbus.com/en/career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Fraunhofer">
            <text:p>Fraunhofer</text:p>
          </table:table-cell>
          <table:table-cell office:value-type="string" office:string-value="https://jobs.fraunhofer.de/search/?createNewAlert=false&amp;q=&amp;locationsearch=&amp;optionsFacetsDD_customfield1=&amp;optionsFacetsDD_customfield2=&amp;optionsFacetsDD_customfield3=&amp;optionsFacetsDD_customfield5=&amp;optionsFacetsDD_customfield4=&amp;optionsFacetsDD_lang=">
            <text:p>https://jobs.fraunhofer.de/search/?createNewAlert=false&amp;q=&amp;locationsearch=&amp;optionsFacetsDD_customfield1=&amp;optionsFacetsDD_customfield2=&amp;optionsFacetsDD_customfield3=&amp;optionsFacetsDD_customfield5=&amp;optionsFacetsDD_customfield4=&amp;optionsFacetsDD_lang=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Helmholtz">
            <text:p>Helmholtz</text:p>
          </table:table-cell>
          <table:table-cell office:value-type="string" office:string-value="https://www.helmholtz.de/en/career/job-vacancies/">
            <text:p>https://www.helmholtz.de/en/career/job-vacancies/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dc="http://purl.org/dc/elements/1.1/" xmlns:style="urn:oasis:names:tc:opendocument:xmlns:style:1.0" xmlns:fo="urn:oasis:names:tc:opendocument:xmlns:xsl-fo-compatible:1.0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dc="http://purl.org/dc/elements/1.1/" xmlns:style="urn:oasis:names:tc:opendocument:xmlns:style:1.0" xmlns:fo="urn:oasis:names:tc:opendocument:xmlns:xsl-fo-compatible:1.0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